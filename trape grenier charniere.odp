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a7500" draw:textarea-horizontal-align="justify" draw:textarea-vertical-align="middle" draw:auto-grow-height="false" fo:min-height="7.116cm" fo:min-width="0.876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6.322cm"/>
    </style:style>
    <style:style style:name="gr3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4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5" style:family="graphic" style:parent-style-name="Arrow_20_Line" style:list-style-name="L2">
      <style:graphic-properties draw:textarea-vertical-align="middle" draw:line-distance="1.585cm" draw:end-guide="-0.018cm"/>
      <style:paragraph-properties style:writing-mode="lr-tb"/>
    </style:style>
    <style:style style:name="gr6" style:family="graphic" style:parent-style-name="Arrow_20_Line" style:list-style-name="L2">
      <style:graphic-properties draw:textarea-vertical-align="middle" draw:line-distance="1.365cm" draw:end-guide="-0.703cm"/>
      <style:paragraph-properties style:writing-mode="lr-tb"/>
    </style:style>
    <style:style style:name="gr7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1.02cm" fo:min-width="6.322cm" draw:shadow-opacity="50%"/>
    </style:style>
    <style:style style:name="gr8" style:family="graphic" style:parent-style-name="standard">
      <style:graphic-properties draw:fill-color="#50938a" draw:textarea-horizontal-align="justify" draw:textarea-vertical-align="middle" draw:auto-grow-height="false" fo:min-height="0.766cm" fo:min-width="7.97cm"/>
    </style:style>
    <style:style style:name="gr9" style:family="graphic" style:parent-style-name="Arrow_20_Line" style:list-style-name="L2">
      <style:graphic-properties draw:textarea-vertical-align="middle" draw:line-distance="0.816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ffb66c" draw:textarea-horizontal-align="justify" draw:textarea-vertical-align="middle" draw:auto-grow-height="false" fo:min-height="1.02cm" fo:min-width="2.429cm"/>
    </style:style>
    <style:style style:name="gr12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1.02cm" fo:min-width="6.322cm"/>
    </style:style>
    <style:style style:name="gr14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15" style:family="graphic" style:parent-style-name="Arrow_20_Line" style:list-style-name="L2">
      <style:graphic-properties draw:textarea-vertical-align="middle" draw:line-distance="1.585cm" draw:end-guide="-0.018cm"/>
      <style:paragraph-properties style:writing-mode="lr-tb"/>
    </style:style>
    <style:style style:name="gr16" style:family="graphic" style:parent-style-name="Arrow_20_Line" style:list-style-name="L2">
      <style:graphic-properties draw:textarea-vertical-align="middle" draw:line-distance="1.365cm" draw:end-guide="-0.703cm"/>
      <style:paragraph-properties style:writing-mode="lr-tb"/>
    </style:style>
    <style:style style:name="gr17" style:family="graphic" style:parent-style-name="Arrow_20_Line" style:list-style-name="L2">
      <style:graphic-properties draw:textarea-vertical-align="middle" draw:line-distance="1.365cm" draw:end-guide="-0.703cm"/>
      <style:paragraph-properties style:writing-mode="lr-tb"/>
    </style:style>
    <style:style style:name="gr18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19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20" style:family="graphic" style:parent-style-name="Arrow_20_Line" style:list-style-name="L2">
      <style:graphic-properties draw:textarea-vertical-align="middle" draw:line-distance="1.585cm" draw:end-guide="-0.018cm"/>
      <style:paragraph-properties style:writing-mode="lr-tb"/>
    </style:style>
    <style:style style:name="gr21" style:family="graphic" style:parent-style-name="Arrow_20_Line" style:list-style-name="L2">
      <style:graphic-properties draw:textarea-vertical-align="middle" draw:line-distance="1.365cm" draw:end-guide="-0.703cm"/>
      <style:paragraph-properties style:writing-mode="lr-tb"/>
    </style:style>
    <style:style style:name="gr22" style:family="graphic" style:parent-style-name="Arrow_20_Line" style:list-style-name="L2">
      <style:graphic-properties draw:textarea-vertical-align="middle" draw:line-distance="0.816cm"/>
      <style:paragraph-properties style:writing-mode="lr-tb"/>
    </style:style>
    <style:style style:name="gr23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24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25" style:family="graphic" style:parent-style-name="Arrow_20_Line" style:list-style-name="L2">
      <style:graphic-properties draw:textarea-vertical-align="middle" draw:line-distance="1.585cm" draw:end-guide="-0.018cm"/>
      <style:paragraph-properties style:writing-mode="lr-tb"/>
    </style:style>
    <style:style style:name="gr26" style:family="graphic" style:parent-style-name="Arrow_20_Line" style:list-style-name="L2">
      <style:graphic-properties draw:textarea-vertical-align="middle" draw:line-distance="1.365cm" draw:end-guide="-0.703cm"/>
      <style:paragraph-properties style:writing-mode="lr-tb"/>
    </style:style>
    <style:style style:name="gr27" style:family="graphic" style:parent-style-name="standard">
      <style:graphic-properties draw:fill-color="#ea7500" draw:textarea-horizontal-align="justify" draw:textarea-vertical-align="middle" draw:auto-grow-height="false" fo:min-height="7.53cm" fo:min-width="0.008cm"/>
    </style:style>
    <style:style style:name="gr28" style:family="graphic" style:parent-style-name="Arrow_20_Line" style:list-style-name="L2">
      <style:graphic-properties draw:textarea-vertical-align="middle" draw:line-distance="1.365cm" draw:end-guide="-0.703cm"/>
      <style:paragraph-properties style:writing-mode="lr-tb"/>
    </style:style>
    <style:style style:name="gr29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30" style:family="graphic" style:parent-style-name="standard">
      <style:graphic-properties draw:fill-color="#ea7500" draw:textarea-horizontal-align="justify" draw:textarea-vertical-align="middle" draw:auto-grow-height="false" fo:min-height="7.116cm" fo:min-width="0.008cm"/>
    </style:style>
    <style:style style:name="gr31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32" style:family="graphic" style:parent-style-name="Arrow_20_Line" style:list-style-name="L2">
      <style:graphic-properties draw:textarea-vertical-align="middle" draw:line-distance="1.585cm" draw:end-guide="-0.018cm"/>
      <style:paragraph-properties style:writing-mode="lr-tb"/>
    </style:style>
    <style:style style:name="gr33" style:family="graphic" style:parent-style-name="Arrow_20_Line" style:list-style-name="L2">
      <style:graphic-properties draw:textarea-vertical-align="middle" draw:line-distance="1.365cm" draw:end-guide="-0.703cm"/>
      <style:paragraph-properties style:writing-mode="lr-tb"/>
    </style:style>
    <style:style style:name="gr34" style:family="graphic" style:parent-style-name="Arrow_20_Line" style:list-style-name="L2">
      <style:graphic-properties draw:textarea-vertical-align="middle" draw:line-distance="0.81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ea75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b2b2b2" draw:opacity="50%"/>
      <style:paragraph-properties fo:text-align="center"/>
    </style:style>
    <style:style style:name="P5" style:family="paragraph">
      <loext:graphic-properties draw:fill-color="#50938a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76cm" svg:height="7.366cm" svg:x="7.112cm" svg:y="6.4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6.822cm" svg:height="1.27cm" svg:x="9.696cm" svg:y="11.478cm">
          <text:p/>
          <draw:enhanced-geometry svg:viewBox="0 0 21600 21600" draw:mirror-horizontal="true" draw:type="rectangle" draw:enhanced-path="M 0 0 L 21600 0 21600 21600 0 21600 0 0 Z N"/>
        </draw:custom-shape>
        <draw:measure draw:style-name="gr3" draw:text-style-name="P3" draw:layer="layout" svg:x1="16.518cm" svg:y1="12.748cm" svg:x2="9.707cm" svg:y2="12.755cm">
          <text:p text:style-name="P3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layout" svg:x1="6.798cm" svg:y1="12.759cm" svg:x2="-0.013cm" svg:y2="12.766cm">
          <text:p text:style-name="P3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3" draw:layer="layout" svg:x1="9.705cm" svg:y1="11.739cm" svg:x2="6.802cm" svg:y2="11.756cm">
          <text:p text:style-name="P3"><text:span text:style-name="T1"><text:measure text:kind="gap"/></text:span><text:span text:style-name="T1"><text:measure text:kind="value">2.9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3" draw:layer="layout" svg:x1="9.708cm" svg:y1="10.819cm" svg:x2="8.505cm" svg:y2="10.818cm">
          <text:p text:style-name="P3"><text:measure text:kind="gap"/><text:measure text:kind="value">1.2</text:measure><text:s/><text:measure text:kind="unit">cm</text:measure><text:measure text:kind="gap"/></text:p>
        </draw:measure>
        <draw:custom-shape draw:style-name="gr7" draw:text-style-name="P4" draw:layer="layout" svg:width="6.822cm" svg:height="1.27cm" draw:transform="rotate (1.57184352434609) translate (8.508cm 12.7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8.47cm" svg:height="1.016cm" svg:x="8.498cm" svg:y="12.754cm">
          <text:p/>
          <draw:enhanced-geometry svg:viewBox="0 0 21600 21600" draw:mirror-horizontal="true" draw:type="rectangle" draw:enhanced-path="M 0 0 L 21600 0 21600 21600 0 21600 0 0 Z N"/>
        </draw:custom-shape>
        <draw:measure draw:style-name="gr9" draw:text-style-name="P3" draw:layer="layout" svg:x1="8.499cm" svg:y1="12.756cm" svg:x2="8.487cm" svg:y2="14.018cm">
          <text:p text:style-name="P3"><text:span text:style-name="T1"><text:measure text:kind="gap"/></text:span><text:span text:style-name="T1"><text:measure text:kind="value">1.26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presentation:notes draw:style-name="dp1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1" draw:text-style-name="P7" draw:layer="layout" svg:width="2.929cm" svg:height="1.27cm" svg:x="6.824cm" svg:y="11.4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6.822cm" svg:height="1.27cm" svg:x="9.732cm" svg:y="11.43cm">
          <text:p/>
          <draw:enhanced-geometry svg:viewBox="0 0 21600 21600" draw:mirror-horizontal="true" draw:type="rectangle" draw:enhanced-path="M 0 0 L 21600 0 21600 21600 0 21600 0 0 Z N"/>
        </draw:custom-shape>
        <draw:measure draw:style-name="gr12" draw:text-style-name="P8" draw:layer="layout" svg:x1="16.554cm" svg:y1="12.7cm" svg:x2="9.743cm" svg:y2="12.708cm">
          <text:p text:style-name="P8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13" draw:text-style-name="P9" draw:layer="layout" svg:width="6.822cm" svg:height="1.27cm" svg:x="0.011cm" svg:y="11.442cm">
          <text:p/>
          <draw:enhanced-geometry svg:viewBox="0 0 21600 21600" draw:mirror-horizontal="true" draw:type="rectangle" draw:enhanced-path="M 0 0 L 21600 0 21600 21600 0 21600 0 0 Z N"/>
        </draw:custom-shape>
        <draw:measure draw:style-name="gr14" draw:text-style-name="P8" draw:layer="layout" svg:x1="6.833cm" svg:y1="12.712cm" svg:x2="0.022cm" svg:y2="12.72cm">
          <text:p text:style-name="P8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15" draw:text-style-name="P8" draw:layer="layout" svg:x1="9.741cm" svg:y1="11.691cm" svg:x2="6.838cm" svg:y2="11.709cm">
          <text:p text:style-name="P8"><text:span text:style-name="T1"><text:measure text:kind="gap"/></text:span><text:span text:style-name="T1"><text:measure text:kind="value">2.9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16" draw:text-style-name="P8" draw:layer="layout" svg:x1="9.743cm" svg:y1="10.772cm" svg:x2="8.54cm" svg:y2="10.771cm">
          <text:p text:style-name="P8"><text:measure text:kind="gap"/><text:measure text:kind="value">1.2</text:measure><text:s/><text:measure text:kind="unit">cm</text:measure><text:measure text:kind="gap"/></text:p>
        </draw:measure>
        <draw:custom-shape draw:style-name="gr8" draw:text-style-name="P5" draw:layer="layout" svg:width="8.47cm" svg:height="1.016cm" svg:x="8.542cm" svg:y="12.708cm">
          <text:p/>
          <draw:enhanced-geometry svg:viewBox="0 0 21600 21600" draw:mirror-horizontal="true" draw:type="rectangle" draw:enhanced-path="M 0 0 L 21600 0 21600 21600 0 21600 0 0 Z N"/>
        </draw:custom-shape>
        <draw:measure draw:style-name="gr17" draw:text-style-name="P8" draw:layer="layout" svg:x1="8.101cm" svg:y1="14.094cm" svg:x2="6.854cm" svg:y2="14.095cm">
          <text:p text:style-name="P8"><text:measure text:kind="gap"/><text:measure text:kind="value">1.25</text:measure><text:s/><text:measure text:kind="unit">cm</text:measure><text:measure text:kind="gap"/></text:p>
        </draw:measure>
        <draw:custom-shape draw:style-name="gr1" draw:text-style-name="P1" draw:layer="layout" svg:width="1.376cm" svg:height="7.366cm" draw:transform="rotate (-1.5707963267949) translate (8.395cm 12.73cm)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custom-shape draw:style-name="gr1" draw:text-style-name="P1" draw:layer="layout" svg:width="1.376cm" svg:height="7.366cm" draw:transform="rotate (-1.5707963267949) translate (8.384cm 12.71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2" draw:layer="layout" svg:width="6.822cm" svg:height="1.27cm" draw:transform="rotate (-1.5707963267949) translate (7.356cm 4.684cm)">
            <text:p/>
            <draw:enhanced-geometry svg:viewBox="0 0 21600 21600" draw:mirror-horizontal="true" draw:type="rectangle" draw:enhanced-path="M 0 0 L 21600 0 21600 21600 0 21600 0 0 Z N"/>
          </draw:custom-shape>
          <draw:measure draw:style-name="gr18" draw:text-style-name="P3" draw:layer="layout" svg:x1="7.355cm" svg:y1="4.684cm" svg:x2="7.362cm" svg:y2="11.495cm">
            <text:p text:style-name="P3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  </draw:measure>
          <draw:measure draw:style-name="gr19" draw:text-style-name="P3" draw:layer="layout" svg:x1="7.366cm" svg:y1="14.404cm" svg:x2="7.373cm" svg:y2="21.215cm">
            <text:p text:style-name="P3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  </draw:measure>
          <draw:measure draw:style-name="gr20" draw:text-style-name="P3" draw:layer="layout" svg:x1="6.346cm" svg:y1="11.497cm" svg:x2="6.363cm" svg:y2="14.4cm">
            <text:p text:style-name="P3"><text:span text:style-name="T1"><text:measure text:kind="gap"/></text:span><text:span text:style-name="T1"><text:measure text:kind="value">2.9</text:measure></text:span><text:span text:style-name="T1"><text:s/></text:span><text:span text:style-name="T1"><text:measure text:kind="unit">cm</text:measure></text:span><text:span text:style-name="T1"><text:measure text:kind="gap"/></text:span></text:p>
          </draw:measure>
          <draw:measure draw:style-name="gr21" draw:text-style-name="P3" draw:layer="layout" svg:x1="5.426cm" svg:y1="11.494cm" svg:x2="5.425cm" svg:y2="12.697cm">
            <text:p text:style-name="P3"><text:measure text:kind="gap"/><text:measure text:kind="value">1.2</text:measure><text:s/><text:measure text:kind="unit">cm</text:measure><text:measure text:kind="gap"/></text:p>
          </draw:measure>
          <draw:custom-shape draw:style-name="gr7" draw:text-style-name="P4" draw:layer="layout" svg:width="6.822cm" svg:height="1.27cm" draw:transform="rotate (0.00104719755119664) translate (0.527cm 11.4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5" draw:layer="layout" svg:width="8.47cm" svg:height="1.016cm" draw:transform="rotate (-1.5707963267949) translate (8.378cm 4.234cm)">
            <text:p/>
            <draw:enhanced-geometry svg:viewBox="0 0 21600 21600" draw:mirror-horizontal="true" draw:type="rectangle" draw:enhanced-path="M 0 0 L 21600 0 21600 21600 0 21600 0 0 Z N"/>
          </draw:custom-shape>
          <draw:measure draw:style-name="gr22" draw:text-style-name="P3" draw:layer="layout" svg:x1="7.363cm" svg:y1="12.703cm" svg:x2="8.625cm" svg:y2="12.715cm">
            <text:p text:style-name="P3"><text:span text:style-name="T1"><text:measure text:kind="gap"/></text:span><text:span text:style-name="T1"><text:measure text:kind="value">1.26</text:measure></text:span><text:span text:style-name="T1"><text:s/></text:span><text:span text:style-name="T1"><text:measure text:kind="unit">cm</text:measure></text:span><text:span text:style-name="T1"><text:measure text:kind="gap"/></text:span></text:p>
          </draw:measure>
        </draw:g>
        <presentation:notes draw:style-name="dp1">
          <draw:page-thumbnail draw:style-name="gr10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0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1" draw:text-style-name="P7" draw:layer="layout" svg:width="2.929cm" svg:height="1.27cm" svg:x="7.27cm" svg:y="11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822cm" svg:height="1.27cm" svg:x="0.4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3" draw:text-style-name="P8" draw:layer="layout" svg:x1="0.47cm" svg:y1="12.7cm" svg:x2="7.281cm" svg:y2="12.708cm">
          <text:p text:style-name="P8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13" draw:text-style-name="P9" draw:layer="layout" svg:width="6.822cm" svg:height="1.27cm" svg:x="10.191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4" draw:text-style-name="P8" draw:layer="layout" svg:x1="10.191cm" svg:y1="12.712cm" svg:x2="17.002cm" svg:y2="12.72cm">
          <text:p text:style-name="P8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25" draw:text-style-name="P8" draw:layer="layout" svg:x1="7.283cm" svg:y1="11.691cm" svg:x2="10.186cm" svg:y2="11.709cm">
          <text:p text:style-name="P8"><text:span text:style-name="T1"><text:measure text:kind="gap"/></text:span><text:span text:style-name="T1"><text:measure text:kind="value">2.9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26" draw:text-style-name="P8" draw:layer="layout" svg:x1="7.281cm" svg:y1="10.772cm" svg:x2="8.484cm" svg:y2="10.771cm">
          <text:p text:style-name="P8"><text:measure text:kind="gap"/><text:measure text:kind="value">1.2</text:measure><text:s/><text:measure text:kind="unit">cm</text:measure><text:measure text:kind="gap"/></text:p>
        </draw:measure>
        <draw:custom-shape draw:style-name="gr8" draw:text-style-name="P5" draw:layer="layout" svg:width="8.47cm" svg:height="1.016cm" svg:x="0.012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0.508cm" svg:height="7.78cm" draw:transform="rotate (1.5707963267949) translate (8.935cm 13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8" draw:text-style-name="P8" draw:layer="layout" svg:x1="8.923cm" svg:y1="14.094cm" svg:x2="10.17cm" svg:y2="14.095cm">
          <text:p text:style-name="P8"><text:measure text:kind="gap"/><text:measure text:kind="value">1.25</text:measure><text:s/><text:measure text:kind="unit">cm</text:measure><text:measure text:kind="gap"/></text:p>
        </draw:measure>
        <presentation:notes draw:style-name="dp1">
          <draw:page-thumbnail draw:style-name="gr10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measure draw:style-name="gr29" draw:text-style-name="P3" draw:layer="layout" svg:x1="10.191cm" svg:y1="12.712cm" svg:x2="17.002cm" svg:y2="12.72cm">
          <text:p text:style-name="P3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custom-shape draw:style-name="gr30" draw:text-style-name="P1" draw:layer="layout" svg:width="0.508cm" svg:height="7.366cm" draw:transform="rotate (-1.57899937427927) translate (16.256cm 12.72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822cm" svg:height="1.27cm" draw:transform="rotate (-1.57899937427927) translate (11.496cm 4.654cm)">
            <text:p/>
            <draw:enhanced-geometry svg:viewBox="0 0 21600 21600" draw:type="rectangle" draw:enhanced-path="M 0 0 L 21600 0 21600 21600 0 21600 0 0 Z N"/>
          </draw:custom-shape>
          <draw:measure draw:style-name="gr31" draw:text-style-name="P3" draw:layer="layout" svg:x1="10.226cm" svg:y1="4.643cm" svg:x2="10.162cm" svg:y2="11.454cm">
            <text:p text:style-name="P3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  </draw:measure>
          <draw:measure draw:style-name="gr32" draw:text-style-name="P3" draw:layer="layout" svg:x1="11.179cm" svg:y1="11.464cm" svg:x2="11.137cm" svg:y2="14.367cm">
            <text:p text:style-name="P3"><text:span text:style-name="T1"><text:measure text:kind="gap"/></text:span><text:span text:style-name="T1"><text:measure text:kind="value">2.9</text:measure></text:span><text:span text:style-name="T1"><text:s/></text:span><text:span text:style-name="T1"><text:measure text:kind="unit">cm</text:measure></text:span><text:span text:style-name="T1"><text:measure text:kind="gap"/></text:span></text:p>
          </draw:measure>
          <draw:measure draw:style-name="gr33" draw:text-style-name="P3" draw:layer="layout" svg:x1="12.098cm" svg:y1="11.47cm" svg:x2="12.089cm" svg:y2="12.673cm">
            <text:p text:style-name="P3"><text:measure text:kind="gap"/><text:measure text:kind="value">1.2</text:measure><text:s/><text:measure text:kind="unit">cm</text:measure><text:measure text:kind="gap"/></text:p>
          </draw:measure>
          <draw:custom-shape draw:style-name="gr7" draw:text-style-name="P4" draw:layer="layout" svg:width="6.822cm" svg:height="1.27cm" draw:transform="rotate (-0.00715584993317655) translate (10.174cm 11.39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8.47cm" svg:height="1.016cm" draw:transform="rotate (-1.57899937427927) translate (10.222cm 4.193cm)">
            <text:p/>
            <draw:enhanced-geometry svg:viewBox="0 0 21600 21600" draw:type="rectangle" draw:enhanced-path="M 0 0 L 21600 0 21600 21600 0 21600 0 0 Z N"/>
          </draw:custom-shape>
          <draw:measure draw:style-name="gr34" draw:text-style-name="P3" draw:layer="layout" svg:x1="10.152cm" svg:y1="12.663cm" svg:x2="8.89cm" svg:y2="12.663cm">
            <text:p text:style-name="P3"><text:span text:style-name="T1"><text:measure text:kind="gap"/></text:span><text:span text:style-name="T1"><text:measure text:kind="value">1.26</text:measure></text:span><text:span text:style-name="T1"><text:s/></text:span><text:span text:style-name="T1"><text:measure text:kind="unit">cm</text:measure></text:span><text:span text:style-name="T1"><text:measure text:kind="gap"/></text:span></text:p>
          </draw:measure>
        </draw:g>
        <draw:custom-shape draw:style-name="gr13" draw:text-style-name="P9" draw:layer="layout" svg:width="6.822cm" svg:height="1.27cm" svg:x="10.191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0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6T14:54:00.865826876</meta:creation-date>
    <dc:date>2025-12-17T10:48:17.261552804</dc:date>
    <meta:editing-duration>PT15H53M26S</meta:editing-duration>
    <meta:editing-cycles>2</meta:editing-cycles>
    <meta:generator>LibreOffice/7.3.7.2$Linux_X86_64 LibreOffice_project/30$Build-2</meta:generator>
    <meta:document-statistic meta:object-count="85"/>
  </office:meta>
</office:document-meta>
</file>